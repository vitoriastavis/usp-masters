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56c2" officeooo:paragraph-rsid="000656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de está disponível em</text:p>
      <text:p text:style-name="P1">https://vitoriastavis.github.io/masters-network/visualize_pde4b.htm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9T13:58:17.500522357</meta:creation-date>
    <dc:date>2026-05-19T13:58:29.723372737</dc:date>
    <meta:editing-duration>PT12S</meta:editing-duration>
    <meta:editing-cycles>1</meta:editing-cycles>
    <meta:document-statistic meta:table-count="0" meta:image-count="0" meta:object-count="0" meta:page-count="1" meta:paragraph-count="2" meta:word-count="5" meta:character-count="91" meta:non-whitespace-character-count="88"/>
    <meta:generator>LibreOffice/7.3.7.2$Linux_X86_64 LibreOffice_project/30$Build-2</meta:generator>
  </office:meta>
</office:document-meta>
</file>